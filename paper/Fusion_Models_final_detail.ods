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3.877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5.184cm"/>
    </style:style>
    <style:style style:name="co11" style:family="table-column">
      <style:table-column-properties fo:break-before="auto" style:column-width="4.03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 style:data-style-name="N11">
      <style:table-cell-properties fo:border-bottom="none" fo:background-color="#ff4000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34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11">
      <style:table-cell-properties fo:border-bottom="0.74pt solid #000000" fo:background-color="#ff4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2" style:family="table-cell" style:parent-style-name="Default" style:data-style-name="N11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4" style:family="table-cell" style:parent-style-name="Default" style:data-style-name="N11">
      <style:table-cell-properties fo:border-bottom="0.74pt solid #000000" fo:background-color="#81d41a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33" style:family="table-cell" style:parent-style-name="Default" style:data-style-name="N11">
      <style:table-cell-properties fo:border-bottom="none" fo:border-left="0.74pt solid #000000" fo:border-right="0.74pt solid #000000" fo:border-top="0.74pt solid #000000"/>
    </style:style>
    <style:style style:name="ce35" style:family="table-cell" style:parent-style-name="Default" style:data-style-name="N11">
      <style:table-cell-properties fo:border-bottom="0.74pt solid #000000" fo:border-left="0.74pt solid #000000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19" style:family="table-cell" style:parent-style-name="Default" style:data-style-name="N11">
      <style:table-cell-properties fo:border-bottom="0.74pt solid #000000" fo:background-color="#81d41a" fo:border-left="0.74pt solid #000000" fo:border-right="0.74pt solid #000000" fo:border-top="none"/>
    </style:style>
    <style:style style:name="ce20" style:family="table-cell" style:parent-style-name="Default" style:data-style-name="N11">
      <style:table-cell-properties fo:border-bottom="none" fo:background-color="#ff4000" fo:border-left="0.74pt solid #000000" fo:border-right="0.74pt solid #000000" fo:border-top="0.74pt solid #000000"/>
    </style:style>
    <style:style style:name="ce21" style:family="table-cell" style:parent-style-name="Default" style:data-style-name="N11">
      <style:table-cell-properties fo:border-bottom="0.74pt solid #000000" fo:background-color="#ff4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4"/>
        <table:table-column table:style-name="co7" table:default-cell-style-name="ce33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5" office:value-type="string" calcext:value-type="string">
            <text:p>Grupo</text:p>
          </table:table-cell>
          <table:table-cell table:style-name="ce29" office:value-type="string" calcext:value-type="string">
            <text:p>Tipo Modelo</text:p>
          </table:table-cell>
          <table:table-cell table:style-name="ce29" office:value-type="string" calcext:value-type="string">
            <text:p>Modelos</text:p>
          </table:table-cell>
          <table:table-cell table:style-name="ce29" office:value-type="string" calcext:value-type="string">
            <text:p>Classes</text:p>
          </table:table-cell>
          <table:table-cell table:style-name="ce29" office:value-type="string" calcext:value-type="string">
            <text:p>F1 Score (Individual)</text:p>
          </table:table-cell>
          <table:table-cell table:style-name="ce29" office:value-type="string" calcext:value-type="string">
            <text:p>F1 Score (model)</text:p>
          </table:table-cell>
          <table:table-cell table:style-name="ce29" office:value-type="string" calcext:value-type="string">
            <text:p>F1 Score PI (base/expert)</text:p>
          </table:table-cell>
          <table:table-cell table:style-name="ce29" office:value-type="string" calcext:value-type="string">
            <text:p>F1 Score M (base/expert)</text:p>
          </table:table-cell>
          <table:table-cell table:style-name="ce36" office:value-type="string" calcext:value-type="string">
            <text:p>F1 Score (concat/meta/moe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catenate </text:p>
          </table:table-cell>
          <table:table-cell office:value-type="string" calcext:value-type="string">
            <text:p>Random Forest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(T) 83,46%</text:p>
          </table:table-cell>
          <table:table-cell office:value-type="percentage" office:value="0.857531789852832" calcext:value-type="percentage">
            <text:p>85,75 %</text:p>
          </table:table-cell>
          <table:table-cell table:style-name="ce33" table:number-columns-repeated="2"/>
          <table:table-cell table:style-name="ce18" office:value-type="percentage" office:value="0.863539405764321" calcext:value-type="percentage">
            <text:p>86,35 %</text:p>
          </table:table-cell>
          <table:table-cell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31" office:value-type="string" calcext:value-type="string">
            <text:p>Concatenate</text:p>
          </table:table-cell>
          <table:table-cell table:style-name="ce31" office:value-type="string" calcext:value-type="string">
            <text:p>Random Forest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34" office:value-type="percentage" office:value="0.936270263990581" calcext:value-type="percentage">
            <text:p>93,63 %</text:p>
          </table:table-cell>
          <table:table-cell table:number-columns-repeated="2"/>
          <table:table-cell office:value-type="percentage" office:value="0.920150499203758" calcext:value-type="percentage">
            <text:p>92,02 %</text:p>
          </table:table-cell>
          <table:table-cell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oncatenate</text:p>
          </table:table-cell>
          <table:table-cell table:style-name="ce32" office:value-type="string" calcext:value-type="string">
            <text:p>Random Forest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string" calcext:value-type="string">
            <text:p>(W) 75,38%</text:p>
          </table:table-cell>
          <table:table-cell table:style-name="ce35" office:value-type="percentage" office:value="0.796999204653497" calcext:value-type="percentage">
            <text:p>79,70 %</text:p>
          </table:table-cell>
          <table:table-cell table:style-name="ce35" table:number-columns-repeated="2"/>
          <table:table-cell table:style-name="ce19" office:value-type="percentage" office:value="0.797553538426918" calcext:value-type="percentage">
            <text:p>79,76 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2 Random Fores + 1 Logistic Regressio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(T) 83,46%</text:p>
          </table:table-cell>
          <table:table-cell/>
          <table:table-cell office:value-type="percentage" office:value="0.790578704310028" calcext:value-type="percentage">
            <text:p>79,06 %</text:p>
          </table:table-cell>
          <table:table-cell office:value-type="percentage" office:value="0.764196663297621" calcext:value-type="percentage">
            <text:p>76,42 %</text:p>
          </table:table-cell>
          <table:table-cell table:style-name="ce18" office:value-type="percentage" office:value="0.89955795278062" calcext:value-type="percentage">
            <text:p>89,96 %</text:p>
          </table:table-cell>
          <table:table-cell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Stacking</text:p>
          </table:table-cell>
          <table:table-cell table:style-name="ce31" office:value-type="string" calcext:value-type="string">
            <text:p>2 Random Fores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34"/>
          <table:table-cell office:value-type="percentage" office:value="0.889464258150217" calcext:value-type="percentage">
            <text:p>88,95 %</text:p>
          </table:table-cell>
          <table:table-cell office:value-type="percentage" office:value="0.728783874301551" calcext:value-type="percentage">
            <text:p>72,88 %</text:p>
          </table:table-cell>
          <table:table-cell office:value-type="percentage" office:value="0.939058365124228" calcext:value-type="percentage">
            <text:p>93,91 %</text:p>
          </table:table-cell>
          <table:table-cell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tacking</text:p>
          </table:table-cell>
          <table:table-cell table:style-name="ce32" office:value-type="string" calcext:value-type="string">
            <text:p>2 Random Fores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string" calcext:value-type="string">
            <text:p>(W) 75,38%</text:p>
          </table:table-cell>
          <table:table-cell table:style-name="ce35"/>
          <table:table-cell table:style-name="ce35" office:value-type="percentage" office:value="0.584456702690731" calcext:value-type="percentage">
            <text:p>58,45 %</text:p>
          </table:table-cell>
          <table:table-cell table:style-name="ce35" office:value-type="percentage" office:value="0.686286601462332" calcext:value-type="percentage">
            <text:p>68,63 %</text:p>
          </table:table-cell>
          <table:table-cell table:style-name="ce19" office:value-type="percentage" office:value="0.833540927588281" calcext:value-type="percentage">
            <text:p>83,35 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2 AutoEncoder + 1 Logistic Regressio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(T) 83,46%</text:p>
          </table:table-cell>
          <table:table-cell/>
          <table:table-cell office:value-type="percentage" office:value="0.678329030703072" calcext:value-type="percentage">
            <text:p>67,83 %</text:p>
          </table:table-cell>
          <table:table-cell office:value-type="percentage" office:value="0.646131570161788" calcext:value-type="percentage">
            <text:p>64,61 %</text:p>
          </table:table-cell>
          <table:table-cell table:style-name="ce20" office:value-type="percentage" office:value="0.71435474229507" calcext:value-type="percentage">
            <text:p>71,44 %</text:p>
          </table:table-cell>
          <table:table-cell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Stacking</text:p>
          </table:table-cell>
          <table:table-cell table:style-name="ce31" office:value-type="string" calcext:value-type="string">
            <text:p>2 AutoEncoder + 1 Logistic Regression</text:p>
          </table:table-cell>
          <table:table-cell table:style-name="ce31" office:value-type="float" office:value="8" calcext:value-type="float">
            <text:p>8</text:p>
          </table:table-cell>
          <table:table-cell table:style-name="ce13"/>
          <table:table-cell table:style-name="ce34"/>
          <table:table-cell office:value-type="percentage" office:value="0.657065664191429" calcext:value-type="percentage">
            <text:p>65,71 %</text:p>
          </table:table-cell>
          <table:table-cell office:value-type="percentage" office:value="0.617139302103142" calcext:value-type="percentage">
            <text:p>61,71 %</text:p>
          </table:table-cell>
          <table:table-cell office:value-type="percentage" office:value="0.67638343923923" calcext:value-type="percentage">
            <text:p>67,64 %</text:p>
          </table:table-cell>
          <table:table-cell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tacking</text:p>
          </table:table-cell>
          <table:table-cell table:style-name="ce32" office:value-type="string" calcext:value-type="string">
            <text:p>2 AutoEncoder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4" office:value-type="string" calcext:value-type="string">
            <text:p>(W) 75,38%</text:p>
          </table:table-cell>
          <table:table-cell table:style-name="ce35"/>
          <table:table-cell table:style-name="ce35" office:value-type="percentage" office:value="0.437941960585781" calcext:value-type="percentage">
            <text:p>43,79 %</text:p>
          </table:table-cell>
          <table:table-cell table:style-name="ce35" office:value-type="percentage" office:value="0.538505174920133" calcext:value-type="percentage">
            <text:p>53,85 %</text:p>
          </table:table-cell>
          <table:table-cell table:style-name="ce21" office:value-type="percentage" office:value="0.378540589578588" calcext:value-type="percentage">
            <text:p>37,85 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xture of Experts</text:p>
          </table:table-cell>
          <table:table-cell office:value-type="string" calcext:value-type="string">
            <text:p>2 Random Forest + 1 Logistic Regressio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(T) 83,46%</text:p>
          </table:table-cell>
          <table:table-cell/>
          <table:table-cell office:value-type="percentage" office:value="0.795164626481822" calcext:value-type="percentage">
            <text:p>79,52 %</text:p>
          </table:table-cell>
          <table:table-cell office:value-type="percentage" office:value="0.766367405930801" calcext:value-type="percentage">
            <text:p>76,64 %</text:p>
          </table:table-cell>
          <table:table-cell table:style-name="ce18" office:value-type="percentage" office:value="0.840037028300656" calcext:value-type="percentage">
            <text:p>84,00 %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Mixture of Experts</text:p>
          </table:table-cell>
          <table:table-cell table:style-name="ce31" office:value-type="string" calcext:value-type="string">
            <text:p>2 Random Forest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34"/>
          <table:table-cell office:value-type="percentage" office:value="0.899859493090585" calcext:value-type="percentage">
            <text:p>89,99 %</text:p>
          </table:table-cell>
          <table:table-cell office:value-type="percentage" office:value="0.723094003792379" calcext:value-type="percentage">
            <text:p>72,31 %</text:p>
          </table:table-cell>
          <table:table-cell office:value-type="percentage" office:value="0.920978173400836" calcext:value-type="percentage">
            <text:p>92,10 %</text:p>
          </table:table-cell>
          <table:table-cell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Mixture of Experts</text:p>
          </table:table-cell>
          <table:table-cell table:style-name="ce32" office:value-type="string" calcext:value-type="string">
            <text:p>2 Random Forest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string" calcext:value-type="string">
            <text:p>(W) 75,38%</text:p>
          </table:table-cell>
          <table:table-cell table:style-name="ce35"/>
          <table:table-cell table:style-name="ce35" office:value-type="percentage" office:value="0.587617031216949" calcext:value-type="percentage">
            <text:p>58,76 %</text:p>
          </table:table-cell>
          <table:table-cell table:style-name="ce35" office:value-type="percentage" office:value="0.683894649933905" calcext:value-type="percentage">
            <text:p>68,39 %</text:p>
          </table:table-cell>
          <table:table-cell table:style-name="ce19" office:value-type="percentage" office:value="0.771110545508164" calcext:value-type="percentage">
            <text:p>77,11 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xture of Experts</text:p>
          </table:table-cell>
          <table:table-cell office:value-type="string" calcext:value-type="string">
            <text:p>2 AutoEncodert + 1 Logistic Regressio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(T) 83,46%</text:p>
          </table:table-cell>
          <table:table-cell/>
          <table:table-cell office:value-type="percentage" office:value="0.664279398545449" calcext:value-type="percentage">
            <text:p>66,43 %</text:p>
          </table:table-cell>
          <table:table-cell office:value-type="percentage" office:value="0.622275573176297" calcext:value-type="percentage">
            <text:p>62,23 %</text:p>
          </table:table-cell>
          <table:table-cell table:style-name="ce20" office:value-type="percentage" office:value="0.703433599630581" calcext:value-type="percentage">
            <text:p>70,34 %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Mixture of Experts</text:p>
          </table:table-cell>
          <table:table-cell table:style-name="ce31" office:value-type="string" calcext:value-type="string">
            <text:p>2 AutoEncodert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34"/>
          <table:table-cell office:value-type="percentage" office:value="0.672918992900499" calcext:value-type="percentage">
            <text:p>67,29 %</text:p>
          </table:table-cell>
          <table:table-cell office:value-type="percentage" office:value="0.55372775424991" calcext:value-type="percentage">
            <text:p>55,37 %</text:p>
          </table:table-cell>
          <table:table-cell office:value-type="percentage" office:value="0.759568956164304" calcext:value-type="percentage">
            <text:p>75,96 %</text:p>
          </table:table-cell>
          <table:table-cell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Mixture of Experts</text:p>
          </table:table-cell>
          <table:table-cell table:style-name="ce32" office:value-type="string" calcext:value-type="string">
            <text:p>2 AutoEncodert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4" office:value-type="string" calcext:value-type="string">
            <text:p>(W) 75,38%</text:p>
          </table:table-cell>
          <table:table-cell table:style-name="ce35"/>
          <table:table-cell table:style-name="ce35" office:value-type="percentage" office:value="0.389248782360997" calcext:value-type="percentage">
            <text:p>38,92 %</text:p>
          </table:table-cell>
          <table:table-cell table:style-name="ce35" office:value-type="percentage" office:value="0.49449553940086" calcext:value-type="percentage">
            <text:p>49,45 %</text:p>
          </table:table-cell>
          <table:table-cell table:style-name="ce21" office:value-type="percentage" office:value="0.542933488997601" calcext:value-type="percentage">
            <text:p>54,29 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xture of Experts</text:p>
          </table:table-cell>
          <table:table-cell office:value-type="string" calcext:value-type="string">
            <text:p>2 Variational AutoEncodert + 1 Logistic Regressio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(T) 83,46%</text:p>
          </table:table-cell>
          <table:table-cell/>
          <table:table-cell office:value-type="percentage" office:value="0.671614663630559" calcext:value-type="percentage">
            <text:p>67,16 %</text:p>
          </table:table-cell>
          <table:table-cell office:value-type="percentage" office:value="0.594696674274938" calcext:value-type="percentage">
            <text:p>59,47 %</text:p>
          </table:table-cell>
          <table:table-cell table:style-name="ce20" office:value-type="percentage" office:value="0.689152663408272" calcext:value-type="percentage">
            <text:p>68,92 %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Mixture of Experts</text:p>
          </table:table-cell>
          <table:table-cell table:style-name="ce31" office:value-type="string" calcext:value-type="string">
            <text:p>2 Variational AutoEncodert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34"/>
          <table:table-cell office:value-type="percentage" office:value="0.674195014073672" calcext:value-type="percentage">
            <text:p>67,42 %</text:p>
          </table:table-cell>
          <table:table-cell office:value-type="percentage" office:value="0.619092010232014" calcext:value-type="percentage">
            <text:p>61,91 %</text:p>
          </table:table-cell>
          <table:table-cell office:value-type="percentage" office:value="0.778337088497888" calcext:value-type="percentage">
            <text:p>77,83 %</text:p>
          </table:table-cell>
          <table:table-cell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Mixture of Experts</text:p>
          </table:table-cell>
          <table:table-cell table:style-name="ce32" office:value-type="string" calcext:value-type="string">
            <text:p>2 Variational AutoEncodert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4" office:value-type="string" calcext:value-type="string">
            <text:p>(W) 75,38%</text:p>
          </table:table-cell>
          <table:table-cell table:style-name="ce35"/>
          <table:table-cell table:style-name="ce35" office:value-type="percentage" office:value="0.398477778147096" calcext:value-type="percentage">
            <text:p>39,85 %</text:p>
          </table:table-cell>
          <table:table-cell table:style-name="ce35" office:value-type="percentage" office:value="0.510389151278193" calcext:value-type="percentage">
            <text:p>51,04 %</text:p>
          </table:table-cell>
          <table:table-cell table:style-name="ce21" office:value-type="percentage" office:value="0.580883751369256" calcext:value-type="percentage">
            <text:p>58,09 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0:49:05.9445234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08T16:44:26.786794365</meta:creation-date>
    <dc:date>2026-02-10T20:19:40.151864391</dc:date>
    <meta:editing-duration>PT10H26M56S</meta:editing-duration>
    <meta:editing-cycles>49</meta:editing-cycles>
    <meta:generator>LibreOffice/6.4.6.2$Linux_X86_64 LibreOffice_project/40$Build-2</meta:generator>
    <meta:document-statistic meta:table-count="1" meta:cell-count="144" meta:object-count="0"/>
  </office:meta>
</office:document-meta>
</file>